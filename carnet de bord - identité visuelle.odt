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2000001E93619400D.png"/>
  <manifest:file-entry manifest:media-type="image/png" manifest:full-path="Pictures/10000201000003E8000003E8CCF7500B.png"/>
  <manifest:file-entry manifest:media-type="image/jpeg" manifest:full-path="Pictures/10000000000001560000013CB9CB3CD4.jpg"/>
  <manifest:file-entry manifest:media-type="image/jpeg" manifest:full-path="Pictures/1000000000000208000001756B34A532.jpg"/>
  <manifest:file-entry manifest:media-type="image/jpeg" manifest:full-path="Pictures/100000000000014D00000112D08842C7.jpg"/>
  <manifest:file-entry manifest:media-type="image/png" manifest:full-path="Pictures/10000201000000E1000000E162F48934.png"/>
  <manifest:file-entry manifest:media-type="image/png" manifest:full-path="Pictures/10000201000001AD000001D0C974CFC1.png"/>
  <manifest:file-entry manifest:media-type="image/png" manifest:full-path="Pictures/10000201000003E8000003E801765AC8.png"/>
  <manifest:file-entry manifest:media-type="image/jpeg" manifest:full-path="Pictures/10000000000007D0000007D0F2A4BF3D.jpg"/>
  <manifest:file-entry manifest:media-type="image/png" manifest:full-path="Pictures/10000201000005190000023319DED225.png"/>
  <manifest:file-entry manifest:media-type="image/png" manifest:full-path="Pictures/1000020100000500000004AD68A9298C.png"/>
  <manifest:file-entry manifest:media-type="image/png" manifest:full-path="Pictures/100002010000015A000001C25B60AD67.png"/>
  <manifest:file-entry manifest:media-type="image/jpeg" manifest:full-path="Pictures/100000000000018F000001519728DDD1.jpg"/>
  <manifest:file-entry manifest:media-type="image/png" manifest:full-path="Pictures/10000201000003E8000003E8A5B4B476.png"/>
  <manifest:file-entry manifest:media-type="image/png" manifest:full-path="Pictures/1000020100000556000003002E3839E9.png"/>
  <manifest:file-entry manifest:media-type="image/jpeg" manifest:full-path="Pictures/10000000000001CA00000137F3357172.jpg"/>
  <manifest:file-entry manifest:media-type="image/png" manifest:full-path="Pictures/100002010000055600000300B30448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style style:name="P6"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dentité visuelle Plok Voyage carnet de bord</text:p>
      <text:p text:style-name="P3"/>
      <text:p text:style-name="P3"/>
      <text:p text:style-name="Standard"/>
      <text:p text:style-name="Standard"><text:span text:style-name="T1">04/02/2022 :</text:span> Réunion sur initiative de Phénix Ethéré pour la construction de l'identité visuelle du Discord.<text:line-break/>Conclusion : l'identité visuelle doit commencer par un logo et lié tout les réseaux sociaux du projet.</text:p>
      <text:p text:style-name="Standard"/>
      <text:p text:style-name="Standard">Proposition de 2 idées : </text:p>
      <text:p text:style-name="Standard"><draw:frame draw:style-name="fr1" draw:name="images2" text:anchor-type="paragraph" svg:x="9.109cm" svg:y="0.847cm" svg:width="5.002cm" svg:height="6.424cm" draw:z-index="1"><draw:image xlink:href="Pictures/100002010000015A000001C25B60AD67.png" xlink:type="simple" xlink:show="embed" xlink:actuate="onLoad"/></draw:frame><draw:frame draw:style-name="fr1" draw:name="images1" text:anchor-type="paragraph" svg:x="0.153cm" svg:y="0.9cm" svg:width="5.953cm" svg:height="5.953cm" draw:z-index="0"><draw:image xlink:href="Pictures/10000201000000E1000000E162F48934.png" xlink:type="simple" xlink:show="embed" xlink:actuate="onLoad"/></draw:frame></text:p>
      <text:p text:style-name="Standard"/>
      <text:p text:style-name="Standard">L'idée de la Mongolfière est retenue.</text:p>
      <text:p text:style-name="Standard"><text:line-break/>Developpement de l'idée : Le logo doit représenter le mouvement, la créativité et le dynamisme autours du thème du voyage et de l'identité de Plok (en tant que personnage publique)</text:p>
      <text:p text:style-name="Standard">=&gt; La couleur principale sera le orange : #FE6A33 </text:p>
      <text:p text:style-name="Standard"/>
      <text:p text:style-name="Standard">La nacelle de la mongolfière sera une valise pour le rappelle du voyage</text:p>
      <text:p text:style-name="Standard">La mongolfière en elle meme représentente l'idée de mouvement et de légèreté.</text:p>
      <text:p text:style-name="Standard">La couleur orange evoque le dynamisme et la créativité</text:p>
      <text:p text:style-name="Standard">Le ballon sera gravé de la lettre P pour le rappelle au personnage Plok</text:p>
      <text:p text:style-name="Standard">Le tout sera dans un style cartoon car l'auditoire ciblé est un publique de 18 à 25 ans dans la découverte et l'envie d'exploration ainsi que de se divertir.</text:p>
      <text:p text:style-name="Standard"/>
      <text:p text:style-name="Standard">Le reste de la réunion était le choix des détails concernant les proportions et les formes du logo.</text:p>
      <text:p text:style-name="Standard"/>
      <text:p text:style-name="Standard">Proposition d'idée de Phénix :</text:p>
      <text:p text:style-name="Standard"/>
      <text:p text:style-name="Standard"><draw:frame draw:style-name="fr1" draw:name="images4" text:anchor-type="paragraph" svg:x="-0.011cm" svg:y="0cm" svg:width="10.195cm" svg:height="4.399cm" draw:z-index="3"><draw:image xlink:href="Pictures/10000201000005190000023319DED225.png" xlink:type="simple" xlink:show="embed" xlink:actuate="onLoad"/></draw:frame></text:p>
      <text:p text:style-name="Standard"><text:soft-page-break/></text:p>
      <text:p text:style-name="Standard"><text:span text:style-name="T1">14/02/2022 :</text:span> Proposition d'une palette par Plok : </text:p>
      <text:p text:style-name="Standard">Palette principale<text:line-break/>#FE6A33<text:line-break/>#4DFF76<text:line-break/>#19B1FF<text:line-break/>#FFAB40<text:line-break/>#FF2639 <text:line-break/>-------------<text:line-break/>Pour les contrastes :<text:line-break/>#E65F2E<text:line-break/>#BF4F26<text:line-break/>#803519<text:line-break/>#401A0D</text:p>
      <text:p text:style-name="Standard"/>
      <text:p text:style-name="Standard">Réunion sur le choix de la mongolfière :</text:p>
      <text:p text:style-name="Standard"/>
      <text:p text:style-name="Standard">Idée retenue :</text:p>
      <text:p text:style-name="Standard"/>
      <text:p text:style-name="Standard"><draw:frame draw:style-name="fr1" draw:name="images5" text:anchor-type="paragraph" svg:x="0.064cm" svg:y="0cm" svg:width="4.544cm" svg:height="4.249cm" draw:z-index="4"><draw:image xlink:href="Pictures/1000020100000500000004AD68A9298C.png" xlink:type="simple" xlink:show="embed" xlink:actuate="onLoad"/></draw:frame></text:p>
      <text:p text:style-name="Standard"/>
      <text:p text:style-name="Standard">Différente idées pour s'inspirer sur le P dans un style cartoon : </text:p>
      <text:p text:style-name="Standard"><draw:frame draw:style-name="fr1" draw:name="images8" text:anchor-type="paragraph" svg:x="7.382cm" svg:y="1.349cm" svg:width="2.357cm" svg:height="1.6cm" draw:z-index="7"><draw:image xlink:href="Pictures/10000000000001CA00000137F3357172.jpg" xlink:type="simple" xlink:show="embed" xlink:actuate="onLoad"/></draw:frame><draw:frame draw:style-name="fr1" draw:name="images9" text:anchor-type="paragraph" svg:x="4.075cm" svg:y="1.244cm" svg:width="1.919cm" svg:height="1.579cm" draw:z-index="8"><draw:image xlink:href="Pictures/100000000000014D00000112D08842C7.jpg" xlink:type="simple" xlink:show="embed" xlink:actuate="onLoad"/></draw:frame><draw:frame draw:style-name="fr1" draw:name="images6" text:anchor-type="paragraph" svg:x="-0.007cm" svg:y="1.143cm" svg:width="2.45cm" svg:height="1.759cm" draw:z-index="5"><draw:image xlink:href="Pictures/1000000000000208000001756B34A532.jpg" xlink:type="simple" xlink:show="embed" xlink:actuate="onLoad"/></draw:frame></text:p>
      <text:p text:style-name="Standard"><draw:frame draw:style-name="fr1" draw:name="images7" text:anchor-type="paragraph" svg:x="10.186cm" svg:y="0.393cm" svg:width="2.237cm" svg:height="1.889cm" draw:z-index="6"><draw:image xlink:href="Pictures/100000000000018F000001519728DDD1.jpg" xlink:type="simple" xlink:show="embed" xlink:actuate="onLoad"/></draw:frame><draw:frame draw:style-name="fr1" draw:name="images10" text:anchor-type="paragraph" svg:x="13.6cm" svg:y="0.464cm" svg:width="1.683cm" svg:height="1.554cm" draw:z-index="9"><draw:image xlink:href="Pictures/10000000000001560000013CB9CB3CD4.jpg" xlink:type="simple" xlink:show="embed" xlink:actuate="onLoad"/></draw:frame>Le style du premier sera choisis</text:p>
      <text:p text:style-name="Standard"/>
      <text:p text:style-name="Standard">Différentes source d'inspirations pour la valise :</text:p>
      <text:p text:style-name="Standard"><draw:frame draw:style-name="fr1" draw:name="images11" text:anchor-type="paragraph" svg:x="0.122cm" svg:y="0.212cm" svg:width="6.756cm" svg:height="3.798cm" draw:z-index="10"><draw:image xlink:href="Pictures/100002010000055600000300B3044879.png" xlink:type="simple" xlink:show="embed" xlink:actuate="onLoad"/></draw:frame></text:p>
      <text:p text:style-name="Standard"><draw:frame draw:style-name="fr1" draw:name="images12" text:anchor-type="paragraph" svg:x="0.704cm" svg:y="0.034cm" svg:width="7.285cm" svg:height="4.096cm" draw:z-index="11"><draw:image xlink:href="Pictures/1000020100000556000003002E3839E9.png" xlink:type="simple" xlink:show="embed" xlink:actuate="onLoad"/></draw:frame><text:soft-page-break/>La valise marron avec un fond bleu/gris sera retenue</text:p>
      <text:p text:style-name="Standard"/>
      <text:p text:style-name="Standard"><text:span text:style-name="T1">17/02/2022 :</text:span> Brouillon de Phénix :</text:p>
      <text:p text:style-name="Standard"><draw:frame draw:style-name="fr1" draw:name="images13" text:anchor-type="paragraph" svg:x="0.007cm" svg:y="0.46cm" svg:width="4.498cm" svg:height="4.498cm" draw:z-index="12"><draw:image xlink:href="Pictures/10000000000007D0000007D0F2A4BF3D.jpg" xlink:type="simple" xlink:show="embed" xlink:actuate="onLoad"/></draw:frame></text:p>
      <text:p text:style-name="Standard"/>
      <text:p text:style-name="Standard">Mise au propre  : </text:p>
      <text:p text:style-name="Standard"/>
      <text:p text:style-name="Standard"/>
      <text:p text:style-name="Standard">Travail réalisé :</text:p>
      <text:p text:style-name="Standard"><draw:frame draw:style-name="fr1" draw:name="images14" text:anchor-type="paragraph" svg:x="0.118cm" svg:y="0.302cm" svg:width="3.747cm" svg:height="3.747cm" draw:z-index="13"><draw:image xlink:href="Pictures/10000201000003E8000003E801765AC8.png" xlink:type="simple" xlink:show="embed" xlink:actuate="onLoad"/></draw:frame></text:p>
      <text:p text:style-name="Standard"/>
      <text:p text:style-name="Standard"/>
      <text:p text:style-name="Standard"><text:span text:style-name="T1">18/02/2022 :</text:span> retouche, rectifications des couleurs en se basant sur ce brouillon de Plok : </text:p>
      <text:p text:style-name="Standard"><draw:frame draw:style-name="fr1" draw:name="images3" text:anchor-type="paragraph" svg:x="0.175cm" svg:y="0.198cm" svg:width="3.637cm" svg:height="3.935cm" draw:z-index="2"><draw:image xlink:href="Pictures/10000201000001AD000001D0C974CFC1.png" xlink:type="simple" xlink:show="embed" xlink:actuate="onLoad"/></draw:frame></text:p>
      <text:p text:style-name="Standard"/>
      <text:p text:style-name="Standard"/>
      <text:p text:style-name="Standard"/>
      <text:p text:style-name="Standard"><text:soft-page-break/>Puis travail réalisé le <text:span text:style-name="T1">19/02/2022</text:span> :</text:p>
      <text:p text:style-name="Standard"/>
      <text:p text:style-name="Standard"/>
      <text:p text:style-name="Standard"><draw:frame draw:style-name="fr1" draw:name="images15" text:anchor-type="paragraph" svg:x="0.044cm" svg:y="0cm" svg:width="4.318cm" svg:height="4.318cm" draw:z-index="14"><draw:image xlink:href="Pictures/10000201000003E8000003E8A5B4B476.png" xlink:type="simple" xlink:show="embed" xlink:actuate="onLoad"/></draw:frame></text:p>
      <text:p text:style-name="Standard">rectification en enlevant la bande blanche en bas du ballon pour que cela soit comme sur mon brouillon.</text:p>
      <text:p text:style-name="Standard"/>
      <text:p text:style-name="Standard">Travail réalisé : </text:p>
      <text:p text:style-name="Standard"><draw:frame draw:style-name="fr1" draw:name="images16" text:anchor-type="paragraph" svg:x="0.242cm" svg:y="0.212cm" svg:width="4.93cm" svg:height="4.93cm" draw:z-index="15"><draw:image xlink:href="Pictures/10000201000003E8000003E8CCF7500B.png" xlink:type="simple" xlink:show="embed" xlink:actuate="onLoad"/></draw:frame></text:p>
      <text:p text:style-name="Standard">Description : </text:p>
      <text:p text:style-name="Standard"/>
      <text:p text:style-name="Standard">- Le orange retenu à #FE6A33 constitue les première rainure du ballon</text:p>
      <text:p text:style-name="Standard">- les deuxième rainures du ballon sont un orange plus clair issue d'une complémentarité partagée double du premier orange =&gt; #FFAB40</text:p>
      <text:p text:style-name="Standard">- Le P est dans un style cartoon avec du relief et de l'arrondi, mais en définissant des angles et une légère orientation vers la droite pour une idée de progrès de mouvement et de projets futures</text:p>
      <text:p text:style-name="Standard">Les contours du ballon sont blanc #FFF9F2</text:p>
      <text:p text:style-name="Standard">- La couleur des bordure du P est #402B10 qui une nuance directe du orange clair. Son fond sera du #FFF9F2</text:p>
      <text:p text:style-name="Standard">- Cette même couleur #402B10 sera utilisée pour les ficelles du ballon et les rainures de la valise</text:p>
      <text:p text:style-name="Standard">- Les 4 coins, le bas du manche de la valise <text:s/>et les boutons clips de la valise seront un monochrome du deuxième orange  =&gt; #FFCD8C</text:p>
      <text:p text:style-name="Standard">- Les boutons sur les 4 coins de la valise sont sur un monochrome du FFAB40 =&gt; #CC8A33</text:p>
      <text:list xml:id="list8600986226167792538" text:style-name="L1">
        <text:list-item>
          <text:p text:style-name="P5">Le fond de la valise est #804600 <text:s/></text:p>
        </text:list-item>
      </text:list>
      <text:p text:style-name="Standard"/>
      <text:p text:style-name="Standard">_______</text:p>
      <text:p text:style-name="Standard"/>
      <text:p text:style-name="Standard"/>
      <text:p text:style-name="Standard"/>
      <text:p text:style-name="Standard"/>
      <text:p text:style-name="Standard"/>
      <text:p text:style-name="Standard"/>
      <text:p text:style-name="Standard"><text:span text:style-name="T3">Charte graphique</text:span><text:line-break/><text:soft-page-break/></text:p>
      <text:p text:style-name="Standard"><text:span text:style-name="T3">Palette :</text:span> <text:line-break/></text:p>
      <text:p text:style-name="Standard"><text:span text:style-name="T2">Fond de logo :</text:span> Chaque illustrations ou sera intégré le logo devra respecter un fond dans un périmetre proche du logo :<text:line-break/>fond 1- #0976B3 (complementaire de FFAB40)</text:p>
      <text:p text:style-name="Standard">fond 2- #19B1FF (complémentaire partagé double de FE6A33)</text:p>
      <text:p text:style-name="Standard">fond 3- #FFF9F2</text:p>
      <text:p text:style-name="Standard"/>
      <text:p text:style-name="P1">Texte : </text:p>
      <text:p text:style-name="Standard">Sur fond blanc #FFFFFF : <text:line-break/>- #000000<text:line-break/>- Toutes les couleurs qui vont suivre :<text:line-break/><text:line-break/></text:p>
      <text:p text:style-name="Standard">Sur fond 1 - #0976B3 : <text:line-break/>A - #FFAB40<text:line-break/>C - #402B10<text:line-break/>D - #FFCF26<text:line-break/>F - #B33F12<text:line-break/>E - #FFF9F2<text:line-break/><text:line-break/></text:p>
      <text:p text:style-name="Standard">Sur fond 2 - #19B1FF : <text:line-break/>B - #FE6A33<text:line-break/>C - #402B10<text:line-break/>D - #FF5F26<text:line-break/>E - FFF9F2<text:line-break/>G - #FFC60D<text:line-break/><text:line-break/><text:line-break/><text:line-break/>Sur fond 3 - #FFF9F2 : <text:line-break/>A - #FFAB40<text:line-break/>B - #FE6A33<text:line-break/>C - #402B10<text:line-break/>H - #403E3D<text:line-break/>I - #19B1FF<text:line-break/>J - #0976B3<text:line-break/><text:line-break/>C s'adapte à tous les fonds<text:line-break/>A, B, D, E peuvent s'adapter à 2 fonds<text:line-break/>F, G, H, I, J s'adaptent à un seul fond<text:line-break/><text:line-break/></text:p>
      <text:p text:style-name="P2">Police :</text:p>
      <text:p text:style-name="Standard"><text:span text:style-name="T3"><text:line-break/></text:span><text:span text:style-name="T4">La police choisis pour accompagner le logo est la police Lato évoquant grace à ses angles et sa rigueur, l'image du dynamisme et de l'ancrage.</text:span></text:p>
      <text:p text:style-name="P4">Fff9f2 lato 45</text:p>
      <text:p text:style-name="P4"><draw:frame draw:style-name="fr2" draw:name="images17" text:anchor-type="paragraph" svg:width="12.755cm" svg:height="12.938cm" draw:z-index="16"><draw:image xlink:href="Pictures/10000201000001E2000001E93619400D.png" xlink:type="simple" xlink:show="embed" xlink:actuate="onLoad"/></draw:frame><text:soft-page-break/><text:line-break/><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dris naulleau</meta:initial-creator>
    <meta:creation-date>2022-02-19T08:43:25.54</meta:creation-date>
    <dc:date>2023-11-08T16:55:25.28</dc:date>
    <meta:editing-duration>P11DT14H26M37S</meta:editing-duration>
    <meta:editing-cycles>12</meta:editing-cycles>
    <meta:generator>OpenOffice/4.1.14$Win32 OpenOffice.org_project/4114m1$Build-9811</meta:generator>
    <meta:document-statistic meta:table-count="0" meta:image-count="17" meta:object-count="0" meta:page-count="6" meta:paragraph-count="52" meta:word-count="666" meta:character-count="3661"/>
  </office:meta>
</office:document-meta>
</file>